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draw="urn:oasis:names:tc:opendocument:xmlns:drawing:1.0" xmlns:svg="urn:oasis:names:tc:opendocument:xmlns:svg-compatible:1.0" office:version="1.2">
  <office:body>
    <office:drawing>
      <draw:page draw:name="page1" draw:master-page-name="Default">
        <draw:rect draw:name="Grandpa" svg:x="8cm" svg:y="2cm" svg:width="5cm" svg:height="2cm">
          <text:p>Grandpa John</text:p>
        </draw:rect>
        <draw:rect draw:name="Grandma" svg:x="15cm" svg:y="2cm" svg:width="5cm" svg:height="2cm">
          <text:p>Grandma Mary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draw="urn:oasis:names:tc:opendocument:xmlns:drawing:1.0" xmlns:fo="urn:oasis:names:tc:opendocument:xmlns:xsl-fo-compatible:1.0" xmlns:style="urn:oasis:names:tc:opendocument:xmlns:style:1.0" office:version="1.2">
  <office:automatic-styles>
    <style:page-layout style:name="PM0">
      <style:page-layout-properties fo:page-width="28cm" fo:page-height="21cm" fo:margin-top="1cm" fo:margin-bottom="1cm" fo:margin-left="1cm" fo:margin-right="1cm"/>
    </style:page-layout>
  </office:automatic-styles>
  <office:master-styles>
    <style:master-page style:name="Default" style:page-layout-name="PM0" draw:style-name="dp1"/>
  </office:master-styles>
</office:document-styles>
</file>