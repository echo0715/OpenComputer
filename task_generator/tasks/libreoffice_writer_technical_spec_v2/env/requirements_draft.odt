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P1">Draft Requirements Document</text:p>
      <text:p text:style-name="P1">This draft captures the initial requirements for the new product. The team should organize and clean up the structure before sharing.</text:p>
      <text:p text:style-name="P1">Overview</text:p>
      <text:p text:style-name="P1">The new internal platform aims to consolidate reporting, alerting, and configuration into a single tool used by every engineering team.</text:p>
      <text:p text:style-name="P1">Functional Requirements</text:p>
      <text:p text:style-name="P1">Users can view dashboards, create custom alerts, manage integrations, and export data. All changes must be audit-logged.</text:p>
      <text:p text:style-name="P1">Non-Functional Requirements</text:p>
      <text:p text:style-name="P1">The platform must support 500 concurrent users and deliver P95 page loads under 800 ms. Uptime target is 99.9 percent.</text:p>
      <text:p text:style-name="P1">System Architecture</text:p>
      <text:p text:style-name="P1">The backend uses a service-oriented architecture with a central API gateway and a PostgreSQL datastore. The frontend is a single-page React app.</text:p>
      <text:p text:style-name="P1">Revision History</text:p>
      <text:p text:style-name="P1">Version history has been tracked informally in email so far and must be migrated into a proper revision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