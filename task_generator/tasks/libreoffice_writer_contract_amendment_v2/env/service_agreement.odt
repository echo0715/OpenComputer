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P1">Service Agreement</text:p>
      <text:p text:style-name="P1">This Service Agreement is entered into between OldCo and ClientX effective Agreement Date: 2024-01-01.</text:p>
      <text:p text:style-name="P1">OldCo agrees to provide consulting services to ClientX for the duration of twelve months from the effective date.</text:p>
      <text:p text:style-name="P1">ClientX shall pay OldCo a monthly retainer of ten thousand dollars for the services described in Schedule A.</text:p>
      <text:p text:style-name="P1">All confidential information shared between OldCo and ClientX is subject to the non-disclosure terms of Section 7.</text:p>
      <text:p text:style-name="P1">Either OldCo or ClientX may terminate this agreement with 30 days written notice.</text:p>
      <text:p text:style-name="P1">This agreement supersedes all prior agreements between OldCo and ClientX regarding the subject matter her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