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 xmlns:svg="urn:oasis:names:tc:opendocument:xmlns:svg-compatible:1.0" office:version="1.2">
  <office:body>
    <office:presentation>
      <draw:page draw:name="Slide1" draw:master-page-name="Default">
        <draw:frame draw:name="title" presentation:class="title" svg:width="20cm" svg:height="3cm" svg:x="2cm" svg:y="1cm">
          <draw:text-box>
            <text:p>FY2025 Financial Review</text:p>
          </draw:text-box>
        </draw:frame>
        <draw:frame draw:name="content" presentation:class="outline" svg:width="20cm" svg:height="12cm" svg:x="2cm" svg:y="5cm">
          <draw:text-box>
            <text:p>Prepared by Finance</text:p>
          </draw:text-box>
        </draw:frame>
      </draw:page>
      <draw:page draw:name="Slide2" draw:master-page-name="Default">
        <draw:frame draw:name="title" presentation:class="title" svg:width="20cm" svg:height="3cm" svg:x="2cm" svg:y="1cm">
          <draw:text-box>
            <text:p>Revenue</text:p>
          </draw:text-box>
        </draw:frame>
        <draw:frame draw:name="content" presentation:class="outline" svg:width="20cm" svg:height="12cm" svg:x="2cm" svg:y="5cm">
          <draw:text-box>
            <text:p>Total revenue: 15.2M</text:p>
            <text:p>YoY growth: 8%</text:p>
          </draw:text-box>
        </draw:frame>
      </draw:page>
      <draw:page draw:name="Slide3" draw:master-page-name="Default">
        <draw:frame draw:name="title" presentation:class="title" svg:width="20cm" svg:height="3cm" svg:x="2cm" svg:y="1cm">
          <draw:text-box>
            <text:p>Expenses</text:p>
          </draw:text-box>
        </draw:frame>
        <draw:frame draw:name="content" presentation:class="outline" svg:width="20cm" svg:height="12cm" svg:x="2cm" svg:y="5cm">
          <draw:text-box>
            <text:p>Total expenses: 10.5M</text:p>
            <text:p>Headcount costs dominate</text:p>
          </draw:text-box>
        </draw:frame>
      </draw:page>
      <draw:page draw:name="Slide4" draw:master-page-name="Default">
        <draw:frame draw:name="title" presentation:class="title" svg:width="20cm" svg:height="3cm" svg:x="2cm" svg:y="1cm">
          <draw:text-box>
            <text:p>Net Income</text:p>
          </draw:text-box>
        </draw:frame>
        <draw:frame draw:name="content" presentation:class="outline" svg:width="20cm" svg:height="12cm" svg:x="2cm" svg:y="5cm">
          <draw:text-box>
            <text:p>Net income: 4.7M</text:p>
          </draw:text-box>
        </draw:frame>
      </draw:page>
      <draw:page draw:name="Slide5" draw:master-page-name="Default">
        <draw:frame draw:name="title" presentation:class="title" svg:width="20cm" svg:height="3cm" svg:x="2cm" svg:y="1cm">
          <draw:text-box>
            <text:p>Cashflow</text:p>
          </draw:text-box>
        </draw:frame>
        <draw:frame draw:name="content" presentation:class="outline" svg:width="20cm" svg:height="12cm" svg:x="2cm" svg:y="5cm">
          <draw:text-box>
            <text:p>Operating cashflow: 5.1M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fo="urn:oasis:names:tc:opendocument:xmlns:xsl-fo-compatible:1.0" office:version="1.2">
  <office:styles/>
  <office:automatic-styles/>
  <office:master-styles>
    <style:master-page style:name="Default" style:page-layout-name="PL1"/>
  </office:master-styles>
</office:document-styles>
</file>