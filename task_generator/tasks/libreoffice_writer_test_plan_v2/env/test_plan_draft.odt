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P1">Login Module Test Plan Draft</text:p>
      <text:p text:style-name="P1">This is the initial test plan draft. It needs structure and a formal test cases table before submission.</text:p>
      <text:p text:style-name="P1">Scope</text:p>
      <text:p text:style-name="P1">This test plan covers the user login flow including credential validation, session creation, and failure handling.</text:p>
      <text:p text:style-name="P1">Approach</text:p>
      <text:p text:style-name="P1">We will use a mix of manual exploratory testing and automated end-to-end tests on the staging environment.</text:p>
      <text:p text:style-name="P1">Test Cases</text:p>
      <text:p text:style-name="P1">The detailed test cases still need to be captured in a table. Replace this paragraph with the table.</text:p>
      <text:p text:style-name="P1">Exit Criteria</text:p>
      <text:p text:style-name="P1">All P0 and P1 bugs must be resolved, test case pass rate must exceed 95 percent, and regression suite must be green for two consecutive ru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