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text="urn:oasis:names:tc:opendocument:xmlns:text:1.0" xmlns:draw="urn:oasis:names:tc:opendocument:xmlns:drawing:1.0" xmlns:presentation="urn:oasis:names:tc:opendocument:xmlns:presentation:1.0" xmlns:svg="urn:oasis:names:tc:opendocument:xmlns:svg-compatible:1.0" xmlns:xlink="http://www.w3.org/1999/xlink" xmlns:table="urn:oasis:names:tc:opendocument:xmlns:table:1.0" office:version="1.2">
  <office:automatic-styles/>
  <office:body>
    <office:presentation>
      <draw:page draw:name="Title" draw:style-name="dp1" draw:master-page-name="Default" presentation:presentation-page-layout-name="AL1T0">
        <draw:frame draw:name="title_Title" presentation:class="title" svg:width="20cm" svg:height="3cm" svg:x="2cm" svg:y="1cm">
          <draw:text-box>
            <text:p>Orbit CRM</text:p>
          </draw:text-box>
        </draw:frame>
        <draw:frame draw:name="subtitle_Title" presentation:class="subtitle" svg:width="20cm" svg:height="3cm" svg:x="2cm" svg:y="5cm">
          <draw:text-box>
            <text:p>Learn more</text:p>
          </draw:text-box>
        </draw:frame>
      </draw:page>
      <draw:page draw:name="Features" draw:style-name="dp1" draw:master-page-name="Default" presentation:presentation-page-layout-name="AL1T0">
        <draw:frame draw:name="title_Features" presentation:class="title" svg:width="20cm" svg:height="3cm" svg:x="2cm" svg:y="1cm">
          <draw:text-box>
            <text:p>Features</text:p>
          </draw:text-box>
        </draw:frame>
        <draw:frame draw:name="body_Features" presentation:class="outline" svg:width="20cm" svg:height="12cm" svg:x="2cm" svg:y="5cm">
          <draw:text-box>
            <text:p>Unified inbox</text:p>
            <text:p>AI-powered pipeline scoring</text:p>
            <text:p>GDPR-ready audit logs</text:p>
          </draw:text-box>
        </draw:frame>
      </draw:page>
      <draw:page draw:name="Pricing" draw:style-name="dp1" draw:master-page-name="Default" presentation:presentation-page-layout-name="AL1T0">
        <draw:frame draw:name="title_Pricing" presentation:class="title" svg:width="20cm" svg:height="3cm" svg:x="2cm" svg:y="1cm">
          <draw:text-box>
            <text:p>Pricing</text:p>
          </draw:text-box>
        </draw:frame>
        <draw:frame draw:name="body_Pricing" presentation:class="outline" svg:width="20cm" svg:height="12cm" svg:x="2cm" svg:y="5cm">
          <draw:text-box>
            <text:p>Starter: 19 USD/month</text:p>
            <text:p>Growth: 49 USD/month</text:p>
            <text:p>Enterprise: custom</text:p>
          </draw:text-box>
        </draw:frame>
      </draw:page>
      <draw:page draw:name="Contact" draw:style-name="dp1" draw:master-page-name="Default" presentation:presentation-page-layout-name="AL1T0">
        <draw:frame draw:name="title_Contact" presentation:class="title" svg:width="20cm" svg:height="3cm" svg:x="2cm" svg:y="1cm">
          <draw:text-box>
            <text:p>Contact</text:p>
          </draw:text-box>
        </draw:frame>
        <draw:frame draw:name="body_Contact" presentation:class="outline" svg:width="20cm" svg:height="12cm" svg:x="2cm" svg:y="5cm">
          <draw:text-box>
            <text:p>sales@orbitcrm.example</text:p>
            <text:p>+1 415 555 0142</text:p>
            <text:p>orbitcrm.example/book-demo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text="urn:oasis:names:tc:opendocument:xmlns:text:1.0" xmlns:svg="urn:oasis:names:tc:opendocument:xmlns:svg-compatible:1.0" xmlns:presentation="urn:oasis:names:tc:opendocument:xmlns:presentation:1.0" office:version="1.2">
  <office:automatic-styles>
    <style:page-layout style:name="PL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/>
    <style:style style:name="title-style" style:family="presentation">
      <style:paragraph-properties fo:text-align="center"/>
      <style:text-properties fo:font-size="36pt"/>
    </style:style>
    <style:style style:name="body-style" style:family="presentation">
      <style:paragraph-properties/>
      <style:text-properties fo:font-size="18pt"/>
    </style:style>
  </office:automatic-styles>
  <office:master-styles>
    <style:master-page style:name="Default" style:page-layout-name="PL1" draw:style-name="dp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syn_env task generator</meta:generator>
    <dc:title>Generated deck</dc:title>
  </office:meta>
</office:document-meta>
</file>