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presentation="urn:oasis:names:tc:opendocument:xmlns:presentation:1.0" xmlns:svg="urn:oasis:names:tc:opendocument:xmlns:svg-compatible:1.0" office:version="1.2">
  <office:body>
    <office:presentation>
      <draw:page draw:name="Slide1" draw:master-page-name="Default">
        <draw:frame draw:name="title" presentation:class="title" svg:width="20cm" svg:height="3cm" svg:x="2cm" svg:y="1cm">
          <draw:text-box>
            <text:p>Phase III Study Results</text:p>
          </draw:text-box>
        </draw:frame>
        <draw:frame draw:name="content" presentation:class="outline" svg:width="20cm" svg:height="12cm" svg:x="2cm" svg:y="5cm">
          <draw:text-box>
            <text:p>TODO: add headline result</text:p>
          </draw:text-box>
        </draw:frame>
      </draw:page>
      <draw:page draw:name="Slide2" draw:master-page-name="Default">
        <draw:frame draw:name="title" presentation:class="title" svg:width="20cm" svg:height="3cm" svg:x="2cm" svg:y="1cm">
          <draw:text-box>
            <text:p>Sample Characteristics</text:p>
          </draw:text-box>
        </draw:frame>
        <draw:frame draw:name="content" presentation:class="outline" svg:width="20cm" svg:height="12cm" svg:x="2cm" svg:y="5cm">
          <draw:text-box>
            <text:p>TODO: sample size details</text:p>
          </draw:text-box>
        </draw:frame>
      </draw:page>
      <draw:page draw:name="Slide3" draw:master-page-name="Default">
        <draw:frame draw:name="title" presentation:class="title" svg:width="20cm" svg:height="3cm" svg:x="2cm" svg:y="1cm">
          <draw:text-box>
            <text:p>Primary Endpoint</text:p>
          </draw:text-box>
        </draw:frame>
        <draw:frame draw:name="content" presentation:class="outline" svg:width="20cm" svg:height="12cm" svg:x="2cm" svg:y="5cm">
          <draw:text-box>
            <text:p>TODO: statistical outcome</text:p>
          </draw:text-box>
        </draw:frame>
      </draw:page>
      <draw:page draw:name="Slide4" draw:master-page-name="Default">
        <draw:frame draw:name="title" presentation:class="title" svg:width="20cm" svg:height="3cm" svg:x="2cm" svg:y="1cm">
          <draw:text-box>
            <text:p>Safety</text:p>
          </draw:text-box>
        </draw:frame>
        <draw:frame draw:name="content" presentation:class="outline" svg:width="20cm" svg:height="12cm" svg:x="2cm" svg:y="5cm">
          <draw:text-box>
            <text:p>TODO: adverse event summary</text:p>
          </draw:text-box>
        </draw:frame>
      </draw:page>
      <draw:page draw:name="Slide5" draw:master-page-name="Default">
        <draw:frame draw:name="title" presentation:class="title" svg:width="20cm" svg:height="3cm" svg:x="2cm" svg:y="1cm">
          <draw:text-box>
            <text:p>Regulatory Plan</text:p>
          </draw:text-box>
        </draw:frame>
        <draw:frame draw:name="content" presentation:class="outline" svg:width="20cm" svg:height="12cm" svg:x="2cm" svg:y="5cm">
          <draw:text-box>
            <text:p>TODO: submission timeline</text:p>
          </draw:text-box>
        </draw:frame>
      </draw:page>
      <draw:page draw:name="Slide6" draw:master-page-name="Default">
        <draw:frame draw:name="title" presentation:class="title" svg:width="20cm" svg:height="3cm" svg:x="2cm" svg:y="1cm">
          <draw:text-box>
            <text:p>Acknowledgements</text:p>
          </draw:text-box>
        </draw:frame>
        <draw:frame draw:name="content" presentation:class="outline" svg:width="20cm" svg:height="12cm" svg:x="2cm" svg:y="5cm">
          <draw:text-box>
            <text:p>TODO: thank collaborator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svg="urn:oasis:names:tc:opendocument:xmlns:svg-compatible:1.0" xmlns:fo="urn:oasis:names:tc:opendocument:xmlns:xsl-fo-compatible:1.0" office:version="1.2">
  <office:styles/>
  <office:automatic-styles/>
  <office:master-styles>
    <style:master-page style:name="Default" style:page-layout-name="PL1"/>
  </office:master-styles>
</office:document-styles>
</file>