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office:version="1.2">
  <office:body>
    <office:drawing>
      <draw:page draw:name="page1" draw:master-page-name="Default">
        <draw:rect draw:name="TitleBox" svg:x="9cm" svg:y="1cm" svg:width="10cm" svg:height="2cm">
          <text:p>Backyard Garden Pla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draw="urn:oasis:names:tc:opendocument:xmlns:drawing:1.0" xmlns:fo="urn:oasis:names:tc:opendocument:xmlns:xsl-fo-compatible:1.0" xmlns:style="urn:oasis:names:tc:opendocument:xmlns:sty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 draw:style-name="dp1"/>
  </office:master-styles>
</office:document-styles>
</file>