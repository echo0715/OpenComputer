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fo="urn:oasis:names:tc:opendocument:xmlns:xsl-fo-compatible:1.0" office:version="1.2">
  <office:automatic-styles>
    <style:style style:name="P1" style:family="paragraph" style:parent-style-name="Standard"/>
    <style:style style:name="Heading_20_1" style:family="paragraph" style:parent-style-name="Heading_20_1" style:class="text"/>
    <style:style style:name="Heading_20_2" style:family="paragraph" style:parent-style-name="Heading_20_2" style:class="text"/>
  </office:automatic-styles>
  <office:body>
    <office:text>
      <text:p text:style-name="Heading_20_1">Changelog</text:p>
      <text:p text:style-name="Heading_20_2">Version 1.0 - January 2026</text:p>
      <text:p text:style-name="P1">- Initial release with core functionality</text:p>
      <text:p text:style-name="P1">- Basic user interface</text:p>
      <text:p text:style-name="P1">- Support for importing CSV files</text:p>
      <text:p text:style-name="Heading_20_2">Version 1.1 - February 2026</text:p>
      <text:p text:style-name="P1">- Bug fixes for data import</text:p>
      <text:p text:style-name="P1">- Improved error messages</text:p>
      <text:p text:style-name="P1">- Added keyboard shortcu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xmlns:text="urn:oasis:names:tc:opendocument:xmlns:text:1.0" office:version="1.2">
  <office:styles>
    <style:style style:name="Standard" style:family="paragraph" style:class="text"/>
    <style:style style:name="Heading_20_1" style:family="paragraph" style:parent-style-name="Standard" style:class="text" style:display-name="Heading 1">
      <style:text-properties fo:font-size="24pt" fo:font-weight="bold"/>
    </style:style>
    <style:style style:name="Heading_20_2" style:family="paragraph" style:parent-style-name="Standard" style:class="text" style:display-name="Heading 2">
      <style:text-properties fo:font-size="18pt" fo:font-weight="bold"/>
    </style:style>
  </office:styles>
</office:document-styles>
</file>