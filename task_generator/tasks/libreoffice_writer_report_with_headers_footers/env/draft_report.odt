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1" style:family="paragraph" style:parent-style-name="Standard"/>
    <style:style style:name="Heading_20_1" style:family="paragraph" style:parent-style-name="Heading_20_1" style:class="text"/>
    <style:style style:name="Heading_20_2" style:family="paragraph" style:parent-style-name="Heading_20_2" style:class="text"/>
  </office:automatic-styles>
  <office:body>
    <office:text>
      <text:p text:style-name="Heading_20_1">Draft Report</text:p>
      <text:p text:style-name="P1">This is a preliminary draft of the quarterly report. It covers the period from January to March 2026.</text:p>
      <text:p text:style-name="P1">The company has seen significant growth in the first quarter, with revenue increasing by 15 percent compared to the same period last year.</text:p>
      <text:p text:style-name="P1">Key highlights include the successful launch of three new products and expansion into two new mark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Standard" style:family="paragraph" style:class="text"/>
    <style:style style:name="Heading_20_1" style:family="paragraph" style:parent-style-name="Standard" style:class="text" style:display-name="Heading 1">
      <style:text-properties fo:font-size="24pt" fo:font-weight="bold"/>
    </style:style>
    <style:style style:name="Heading_20_2" style:family="paragraph" style:parent-style-name="Standard" style:class="text" style:display-name="Heading 2">
      <style:text-properties fo:font-size="18pt" fo:font-weight="bold"/>
    </style:style>
  </office:styles>
</office:document-styles>
</file>