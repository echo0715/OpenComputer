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ellipse draw:name="Internet" svg:x="11cm" svg:y="2cm" svg:width="6cm" svg:height="3cm">
          <text:p>Interne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