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P1">Welcome to the product. This introduction covers the basics of getting started with the application.</text:p>
      <text:p text:style-name="P1">The application provides a comprehensive set of tools for managing your workflow and boosting productivity.</text:p>
      <text:p text:style-name="P1">To set up the application, follow these steps: download the installer, run the setup wizard, and configure your preferences.</text:p>
      <text:p text:style-name="P1">Daily usage involves creating projects, adding tasks, and tracking your progress through the built-in dashboard.</text:p>
      <text:p text:style-name="P1">Frequently asked questions: How do I reset my password? Go to Settings and click Reset Password. How do I export data? Use File then Export.</text:p>
      <text:p text:style-name="P1">For support, contact us at support@example.com or call 1-800-555-0199 during business ho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