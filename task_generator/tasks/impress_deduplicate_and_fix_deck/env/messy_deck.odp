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 office:version="1.2">
  <office:body>
    <office:presentation>
      <draw:page draw:name="Slide1" draw:master-page-name="Default">
        <draw:frame draw:name="title" presentation:class="title" svg:width="20cm" svg:height="3cm" svg:x="2cm" svg:y="1cm">
          <draw:text-box>
            <text:p>Intro</text:p>
          </draw:text-box>
        </draw:frame>
        <draw:frame draw:name="content" presentation:class="outline" svg:width="20cm" svg:height="12cm" svg:x="2cm" svg:y="5cm">
          <draw:text-box>
            <text:p>Overview of the research</text:p>
          </draw:text-box>
        </draw:frame>
      </draw:page>
      <draw:page draw:name="Slide2" draw:master-page-name="Default">
        <draw:frame draw:name="title" presentation:class="title" svg:width="20cm" svg:height="3cm" svg:x="2cm" svg:y="1cm">
          <draw:text-box>
            <text:p>Data</text:p>
          </draw:text-box>
        </draw:frame>
        <draw:frame draw:name="content" presentation:class="outline" svg:width="20cm" svg:height="12cm" svg:x="2cm" svg:y="5cm">
          <draw:text-box>
            <text:p>Data sources: surveys, logs, interviews</text:p>
          </draw:text-box>
        </draw:frame>
      </draw:page>
      <draw:page draw:name="Slide3" draw:master-page-name="Default">
        <draw:frame draw:name="title" presentation:class="title" svg:width="20cm" svg:height="3cm" svg:x="2cm" svg:y="1cm">
          <draw:text-box>
            <text:p>Intro</text:p>
          </draw:text-box>
        </draw:frame>
        <draw:frame draw:name="content" presentation:class="outline" svg:width="20cm" svg:height="12cm" svg:x="2cm" svg:y="5cm">
          <draw:text-box>
            <text:p>Overview of the research</text:p>
          </draw:text-box>
        </draw:frame>
      </draw:page>
      <draw:page draw:name="Slide4" draw:master-page-name="Default">
        <draw:frame draw:name="title" presentation:class="title" svg:width="20cm" svg:height="3cm" svg:x="2cm" svg:y="1cm">
          <draw:text-box>
            <text:p>Analysis</text:p>
          </draw:text-box>
        </draw:frame>
        <draw:frame draw:name="content" presentation:class="outline" svg:width="20cm" svg:height="12cm" svg:x="2cm" svg:y="5cm">
          <draw:text-box>
            <text:p>Regression analysis results</text:p>
          </draw:text-box>
        </draw:frame>
      </draw:page>
      <draw:page draw:name="Slide5" draw:master-page-name="Default">
        <draw:frame draw:name="title" presentation:class="title" svg:width="20cm" svg:height="3cm" svg:x="2cm" svg:y="1cm">
          <draw:text-box>
            <text:p>Data</text:p>
          </draw:text-box>
        </draw:frame>
        <draw:frame draw:name="content" presentation:class="outline" svg:width="20cm" svg:height="12cm" svg:x="2cm" svg:y="5cm">
          <draw:text-box>
            <text:p>Data sources: surveys, logs, interviews</text:p>
          </draw:text-box>
        </draw:frame>
      </draw:page>
      <draw:page draw:name="Slide6" draw:master-page-name="Default">
        <draw:frame draw:name="title" presentation:class="title" svg:width="20cm" svg:height="3cm" svg:x="2cm" svg:y="1cm">
          <draw:text-box>
            <text:p>Findings</text:p>
          </draw:text-box>
        </draw:frame>
        <draw:frame draw:name="content" presentation:class="outline" svg:width="20cm" svg:height="12cm" svg:x="2cm" svg:y="5cm">
          <draw:text-box>
            <text:p>Three significant findings</text:p>
          </draw:text-box>
        </draw:frame>
      </draw:page>
      <draw:page draw:name="Slide7" draw:master-page-name="Default">
        <draw:frame draw:name="title" presentation:class="title" svg:width="20cm" svg:height="3cm" svg:x="2cm" svg:y="1cm">
          <draw:text-box>
            <text:p>Analysis</text:p>
          </draw:text-box>
        </draw:frame>
        <draw:frame draw:name="content" presentation:class="outline" svg:width="20cm" svg:height="12cm" svg:x="2cm" svg:y="5cm">
          <draw:text-box>
            <text:p>Regression analysis results</text:p>
          </draw:text-box>
        </draw:frame>
      </draw:page>
      <draw:page draw:name="Slide8" draw:master-page-name="Default">
        <draw:frame draw:name="title" presentation:class="title" svg:width="20cm" svg:height="3cm" svg:x="2cm" svg:y="1cm">
          <draw:text-box>
            <text:p>Outro</text:p>
          </draw:text-box>
        </draw:frame>
        <draw:frame draw:name="content" presentation:class="outline" svg:width="20cm" svg:height="12cm" svg:x="2cm" svg:y="5cm">
          <draw:text-box>
            <text:p>End of draft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office:version="1.2">
  <office:styles/>
  <office:automatic-styles/>
  <office:master-styles>
    <style:master-page style:name="Default" style:page-layout-name="PL1"/>
  </office:master-styles>
</office:document-styles>
</file>