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raw="urn:oasis:names:tc:opendocument:xmlns:drawing:1.0" xmlns:svg="urn:oasis:names:tc:opendocument:xmlns:svg-compatible:1.0" xmlns:text="urn:oasis:names:tc:opendocument:xmlns:text:1.0" xmlns:xlink="http://www.w3.org/1999/xlink" office:version="1.2">
  <office:body>
    <office:drawing>
      <draw:page draw:name="page1" draw:master-page-name="Default">
        <draw:rect draw:name="rect_page1" svg:x="4cm" svg:y="4cm" svg:width="12cm" svg:height="4cm">
          <text:p>Intro Section</text:p>
        </draw:rect>
      </draw:page>
      <draw:page draw:name="page2" draw:master-page-name="Default">
        <draw:rect draw:name="rect_page2" svg:x="4cm" svg:y="4cm" svg:width="12cm" svg:height="4cm">
          <text:p>Methods Section</text:p>
        </draw:rect>
      </draw:page>
      <draw:page draw:name="page3" draw:master-page-name="Default">
        <draw:rect draw:name="rect_page3" svg:x="4cm" svg:y="4cm" svg:width="12cm" svg:height="4cm">
          <text:p>Results Section</text:p>
        </draw:rect>
      </draw:page>
      <draw:page draw:name="page4" draw:master-page-name="Default">
        <draw:rect draw:name="rect_page4" svg:x="4cm" svg:y="4cm" svg:width="12cm" svg:height="4cm">
          <text:p>Appendix Secti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draw="urn:oasis:names:tc:opendocument:xmlns:drawing:1.0" xmlns:fo="urn:oasis:names:tc:opendocument:xmlns:xsl-fo-compatib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/>
  </office:master-styles>
</office:document-styles>
</file>