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BoxA" svg:x="10cm" svg:y="2cm" svg:width="6cm" svg:height="3cm">
          <text:p>Box A</text:p>
        </draw:rect>
        <draw:rect draw:name="BoxB" svg:x="10cm" svg:y="7cm" svg:width="6cm" svg:height="3cm">
          <text:p>Box B</text:p>
        </draw:rect>
        <draw:rect draw:name="BoxC" svg:x="10cm" svg:y="12cm" svg:width="6cm" svg:height="3cm">
          <text:p>Box C</text:p>
        </draw:rect>
        <draw:rect draw:name="BoxD" svg:x="10cm" svg:y="17cm" svg:width="6cm" svg:height="3cm">
          <text:p>Box 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