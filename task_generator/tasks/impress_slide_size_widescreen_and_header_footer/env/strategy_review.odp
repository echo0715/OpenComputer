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fo="urn:oasis:names:tc:opendocument:xmlns:xsl-fo-compatible:1.0" xmlns:text="urn:oasis:names:tc:opendocument:xmlns:text:1.0" xmlns:draw="urn:oasis:names:tc:opendocument:xmlns:drawing:1.0" xmlns:presentation="urn:oasis:names:tc:opendocument:xmlns:presentation:1.0" xmlns:svg="urn:oasis:names:tc:opendocument:xmlns:svg-compatible:1.0" xmlns:xlink="http://www.w3.org/1999/xlink" xmlns:table="urn:oasis:names:tc:opendocument:xmlns:table:1.0" office:version="1.2">
  <office:automatic-styles/>
  <office:body>
    <office:presentation>
      <draw:page draw:name="Title" draw:style-name="dp1" draw:master-page-name="Default" presentation:presentation-page-layout-name="AL1T0">
        <draw:frame draw:name="title_Title" presentation:class="title" svg:width="20cm" svg:height="3cm" svg:x="2cm" svg:y="1cm">
          <draw:text-box>
            <text:p>Strategy Review 2026</text:p>
          </draw:text-box>
        </draw:frame>
        <draw:frame draw:name="subtitle_Title" presentation:class="subtitle" svg:width="20cm" svg:height="3cm" svg:x="2cm" svg:y="5cm">
          <draw:text-box>
            <text:p>Executive Briefing</text:p>
          </draw:text-box>
        </draw:frame>
      </draw:page>
      <draw:page draw:name="Market" draw:style-name="dp1" draw:master-page-name="Default" presentation:presentation-page-layout-name="AL1T0">
        <draw:frame draw:name="title_Market" presentation:class="title" svg:width="20cm" svg:height="3cm" svg:x="2cm" svg:y="1cm">
          <draw:text-box>
            <text:p>Market</text:p>
          </draw:text-box>
        </draw:frame>
        <draw:frame draw:name="body_Market" presentation:class="outline" svg:width="20cm" svg:height="12cm" svg:x="2cm" svg:y="5cm">
          <draw:text-box>
            <text:p>Demand outlook</text:p>
            <text:p>Key competitors</text:p>
            <text:p>Pricing pressures</text:p>
          </draw:text-box>
        </draw:frame>
      </draw:page>
      <draw:page draw:name="Product" draw:style-name="dp1" draw:master-page-name="Default" presentation:presentation-page-layout-name="AL1T0">
        <draw:frame draw:name="title_Product" presentation:class="title" svg:width="20cm" svg:height="3cm" svg:x="2cm" svg:y="1cm">
          <draw:text-box>
            <text:p>Product</text:p>
          </draw:text-box>
        </draw:frame>
        <draw:frame draw:name="body_Product" presentation:class="outline" svg:width="20cm" svg:height="12cm" svg:x="2cm" svg:y="5cm">
          <draw:text-box>
            <text:p>Platform updates</text:p>
            <text:p>Roadmap highlights</text:p>
            <text:p>Customer feedback</text:p>
          </draw:text-box>
        </draw:frame>
      </draw:page>
      <draw:page draw:name="Pricing" draw:style-name="dp1" draw:master-page-name="Default" presentation:presentation-page-layout-name="AL1T0">
        <draw:frame draw:name="title_Pricing" presentation:class="title" svg:width="20cm" svg:height="3cm" svg:x="2cm" svg:y="1cm">
          <draw:text-box>
            <text:p>Pricing</text:p>
          </draw:text-box>
        </draw:frame>
        <draw:frame draw:name="body_Pricing" presentation:class="outline" svg:width="20cm" svg:height="12cm" svg:x="2cm" svg:y="5cm">
          <draw:text-box>
            <text:p>Tier structure</text:p>
            <text:p>Enterprise discounts</text:p>
            <text:p>Partner program</text:p>
          </draw:text-box>
        </draw:frame>
      </draw:page>
      <draw:page draw:name="Roadmap" draw:style-name="dp1" draw:master-page-name="Default" presentation:presentation-page-layout-name="AL1T0">
        <draw:frame draw:name="title_Roadmap" presentation:class="title" svg:width="20cm" svg:height="3cm" svg:x="2cm" svg:y="1cm">
          <draw:text-box>
            <text:p>Roadmap</text:p>
          </draw:text-box>
        </draw:frame>
        <draw:frame draw:name="body_Roadmap" presentation:class="outline" svg:width="20cm" svg:height="12cm" svg:x="2cm" svg:y="5cm">
          <draw:text-box>
            <text:p>Q2 deliverables</text:p>
            <text:p>Q3 beta launches</text:p>
            <text:p>Q4 customer rollouts</text:p>
          </draw:text-box>
        </draw:frame>
      </draw:page>
      <draw:page draw:name="Thanks" draw:style-name="dp1" draw:master-page-name="Default" presentation:presentation-page-layout-name="AL1T0">
        <draw:frame draw:name="title_Thanks" presentation:class="title" svg:width="20cm" svg:height="3cm" svg:x="2cm" svg:y="1cm">
          <draw:text-box>
            <text:p>Thanks</text:p>
          </draw:text-box>
        </draw:frame>
        <draw:frame draw:name="subtitle_Thanks" presentation:class="subtitle" svg:width="20cm" svg:height="3cm" svg:x="2cm" svg:y="5cm">
          <draw:text-box>
            <text:p>Questions?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draw="urn:oasis:names:tc:opendocument:xmlns:drawing:1.0" xmlns:text="urn:oasis:names:tc:opendocument:xmlns:text:1.0" xmlns:svg="urn:oasis:names:tc:opendocument:xmlns:svg-compatible:1.0" xmlns:presentation="urn:oasis:names:tc:opendocument:xmlns:presentation:1.0" office:version="1.2">
  <office:automatic-styles>
    <style:page-layout style:name="PL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/>
    <style:style style:name="title-style" style:family="presentation">
      <style:paragraph-properties fo:text-align="center"/>
      <style:text-properties fo:font-size="36pt"/>
    </style:style>
    <style:style style:name="body-style" style:family="presentation">
      <style:paragraph-properties/>
      <style:text-properties fo:font-size="18pt"/>
    </style:style>
  </office:automatic-styles>
  <office:master-styles>
    <style:master-page style:name="Default" style:page-layout-name="PL1" draw:style-name="dp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meta:generator>syn_env task generator</meta:generator>
    <dc:title>Generated deck</dc:title>
  </office:meta>
</office:document-meta>
</file>