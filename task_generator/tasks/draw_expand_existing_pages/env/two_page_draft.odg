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rect draw:name="Overview" svg:x="8cm" svg:y="8cm" svg:width="10cm" svg:height="4cm">
          <text:p>Overview</text:p>
        </draw:rect>
      </draw:page>
      <draw:page draw:name="page2" draw:master-page-name="Default">
        <draw:rect draw:name="Details" svg:x="8cm" svg:y="8cm" svg:width="10cm" svg:height="4cm">
          <text:p>Detail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