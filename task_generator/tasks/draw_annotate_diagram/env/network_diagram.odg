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Server" svg:x="10cm" svg:y="3cm" svg:width="5cm" svg:height="3cm">
          <text:p>Server</text:p>
        </draw:rect>
        <draw:rect draw:name="Client" svg:x="3cm" svg:y="10cm" svg:width="5cm" svg:height="3cm">
          <text:p>Client</text:p>
        </draw:rect>
        <draw:rect draw:name="Switch" svg:x="17cm" svg:y="10cm" svg:width="5cm" svg:height="3cm">
          <text:p>Switch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