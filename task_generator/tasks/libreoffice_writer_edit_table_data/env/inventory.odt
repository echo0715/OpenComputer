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automatic-styles>
    <style:style style:name="P1" style:family="paragraph" style:parent-style-name="Standard"/>
    <style:style style:name="Heading_20_1" style:family="paragraph" style:parent-style-name="Heading_20_1" style:class="text"/>
    <style:style style:name="Heading_20_2" style:family="paragraph" style:parent-style-name="Heading_20_2" style:class="text"/>
  </office:automatic-styles>
  <office:body>
    <office:text>
      <text:p text:style-name="Heading_20_1">Product Inventory</text:p>
      <table:table table:name="Table1" table:style-name="Table1">
        <table:table-column table:number-columns-repeated="3"/>
        <table:table-row>
          <table:table-cell>
            <text:p>Product</text:p>
          </table:table-cell>
          <table:table-cell>
            <text:p>Stock</text:p>
          </table:table-cell>
          <table:table-cell>
            <text:p>Price</text:p>
          </table:table-cell>
        </table:table-row>
        <table:table-row>
          <table:table-cell>
            <text:p>Laptop</text:p>
          </table:table-cell>
          <table:table-cell>
            <text:p>50</text:p>
          </table:table-cell>
          <table:table-cell>
            <text:p>999</text:p>
          </table:table-cell>
        </table:table-row>
        <table:table-row>
          <table:table-cell>
            <text:p>Keyboard</text:p>
          </table:table-cell>
          <table:table-cell>
            <text:p>200</text:p>
          </table:table-cell>
          <table:table-cell>
            <text:p>79</text:p>
          </table:table-cell>
        </table:table-row>
        <table:table-row>
          <table:table-cell>
            <text:p>Mouse</text:p>
          </table:table-cell>
          <table:table-cell>
            <text:p>150</text:p>
          </table:table-cell>
          <table:table-cell>
            <text:p>25</text:p>
          </table:table-cell>
        </table:table-row>
        <table:table-row>
          <table:table-cell>
            <text:p>Monitor</text:p>
          </table:table-cell>
          <table:table-cell>
            <text:p>30</text:p>
          </table:table-cell>
          <table:table-cell>
            <text:p>450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office:version="1.2">
  <office:styles>
    <style:style style:name="Standard" style:family="paragraph" style:class="text"/>
    <style:style style:name="Heading_20_1" style:family="paragraph" style:parent-style-name="Standard" style:class="text" style:display-name="Heading 1">
      <style:text-properties fo:font-size="24pt" fo:font-weight="bold"/>
    </style:style>
    <style:style style:name="Heading_20_2" style:family="paragraph" style:parent-style-name="Standard" style:class="text" style:display-name="Heading 2">
      <style:text-properties fo:font-size="18pt" fo:font-weight="bold"/>
    </style:style>
  </office:styles>
</office:document-styles>
</file>