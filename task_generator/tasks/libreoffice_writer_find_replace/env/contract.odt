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1" style:family="paragraph" style:parent-style-name="Standard"/>
    <style:style style:name="Heading_20_1" style:family="paragraph" style:parent-style-name="Heading_20_1" style:class="text"/>
    <style:style style:name="Heading_20_2" style:family="paragraph" style:parent-style-name="Heading_20_2" style:class="text"/>
  </office:automatic-styles>
  <office:body>
    <office:text>
      <text:p text:style-name="Heading_20_1">Service Agreement</text:p>
      <text:p text:style-name="P1">This agreement is entered into by ACME Corp and the client as of January 1, 2025.</text:p>
      <text:p text:style-name="P1">ACME Corp agrees to provide software development services for the duration of this contract.</text:p>
      <text:p text:style-name="P1">The contract term begins on March 1, 2025 and ends on December 31, 2025.</text:p>
      <text:p text:style-name="P1">ACME Corp shall deliver all milestones according to the schedule outlined in Appendix A.</text:p>
      <text:p text:style-name="P1">Payment shall be made to ACME Corp within 30 days of each milestone completion.</text:p>
      <text:p text:style-name="P1">This agreement is governed by the laws of the state where ACME Corp is headquarte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 style:class="text" style:display-name="Heading 1">
      <style:text-properties fo:font-size="24pt" fo:font-weight="bold"/>
    </style:style>
    <style:style style:name="Heading_20_2" style:family="paragraph" style:parent-style-name="Standard" style:class="text" style:display-name="Heading 2">
      <style:text-properties fo:font-size="18pt" fo:font-weight="bold"/>
    </style:style>
  </office:styles>
</office:document-styles>
</file>