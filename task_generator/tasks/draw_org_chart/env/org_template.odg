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presentation="urn:oasis:names:tc:opendocument:xmlns:presentation:1.0" office:version="1.2">
  <office:body>
    <office:drawing>
      <draw:page draw:name="page1" draw:master-page-name="Default"/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