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P1">The Future of Renewable Energy</text:p>
      <text:p text:style-name="P1">Renewable energy sources have become increasingly important in the global effort to combat climate change.</text:p>
      <text:p text:style-name="P1">Solar Power Advancements</text:p>
      <text:p text:style-name="P1">Recent breakthroughs in solar panel technology have dramatically reduced costs and improved efficiency.</text:p>
      <text:p text:style-name="P1">New photovoltaic cells can now convert over 30 percent of sunlight into electric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