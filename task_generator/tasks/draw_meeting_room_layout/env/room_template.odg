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Room" svg:x="2cm" svg:y="2cm" svg:width="24cm" svg:height="17cm">
          <text:p>Room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